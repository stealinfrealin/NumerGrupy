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59cm" fo:margin-left="-0.053cm" fo:margin-top="0cm" fo:margin-bottom="0cm" table:align="left" style:shadow="none" style:may-break-between-rows="true" style:writing-mode="page" table:border-model="collapsing"/>
    </style:style>
    <style:style style:name="Tabela1.A" style:family="table-column">
      <style:table-column-properties style:column-width="7.045cm"/>
    </style:style>
    <style:style style:name="Tabela1.B" style:family="table-column">
      <style:table-column-properties style:column-width="10.014cm"/>
    </style:style>
    <style:style style:name="Tabela1.1" style:family="table-row">
      <style:table-row-properties style:min-row-height="0.647cm" fo:keep-together="auto"/>
    </style:style>
    <style:style style:name="Tabela1.A1" style:family="table-cell">
      <style:table-cell-properties style:vertical-align="bottom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style:vertical-align="bottom" fo:background-color="transparent" fo:padding="0.097cm" fo:border="0.5pt solid #000000" style:writing-mode="page">
        <style:background-image/>
      </style:table-cell-properties>
    </style:style>
    <style:style style:name="Tabela1.2" style:family="table-row">
      <style:table-row-properties style:min-row-height="8.543cm" fo:keep-together="auto"/>
    </style:style>
    <style:style style:name="Tabela1.A2" style:family="table-cell">
      <style:table-cell-properties style:vertical-align="bottom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style:vertical-align="bottom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3" style:family="table-row">
      <style:table-row-properties style:min-row-height="7.735cm" fo:keep-together="auto"/>
    </style:style>
    <style:style style:name="Tabela1.4" style:family="table-row">
      <style:table-row-properties style:min-row-height="8.946cm" fo:keep-together="auto"/>
    </style:style>
    <style:style style:name="Tabela1.5" style:family="table-row">
      <style:table-row-properties style:min-row-height="6.523cm" fo:keep-together="auto"/>
    </style:style>
    <style:style style:name="Tabela1.8" style:family="table-row">
      <style:table-row-properties style:min-row-height="6.119cm" fo:keep-together="auto"/>
    </style:style>
    <style:style style:name="Tabela1.13" style:family="table-row">
      <style:table-row-properties style:min-row-height="7.331cm" fo:keep-together="auto"/>
    </style:style>
    <style:style style:name="Tabela1.16" style:family="table-row">
      <style:table-row-properties style:min-row-height="6.927cm" fo:keep-together="auto"/>
    </style:style>
    <style:style style:name="Tabela1.22" style:family="table-row">
      <style:table-row-properties style:min-row-height="8.139cm" fo:keep-together="auto"/>
    </style:style>
    <style:style style:name="Tabela1.28" style:family="table-row">
      <style:table-row-properties style:min-row-height="4.888cm" fo:keep-together="auto"/>
    </style:style>
    <style:style style:name="Tabela1.30" style:family="table-row">
      <style:table-row-properties style:min-row-height="5.313cm" fo:keep-together="auto"/>
    </style:style>
    <style:style style:name="Tabela1.31" style:family="table-row">
      <style:table-row-properties style:min-row-height="5.715cm" fo:keep-together="auto"/>
    </style:style>
    <style:style style:name="P1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1a98" officeooo:paragraph-rsid="00081a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family="'Liberation Sans'" style:font-family-generic="roman" style:font-pitch="variab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a1" table:style-name="Tabela1" table:template-name="Default Style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">Numer Story</text:p>
          </table:table-cell>
          <table:table-cell table:style-name="Tabela1.B1" office:value-type="string">
            <text:p text:style-name="P1">Opis (z Jira)</text:p>
          </table:table-cell>
        </table:table-row>
        <table:table-row table:style-name="Tabela1.2">
          <table:table-cell table:style-name="Tabela1.A2" office:value-type="string">
            <text:p text:style-name="P2">1.1 Rejestracja konta pacjenta</text:p>
          </table:table-cell>
          <table:table-cell table:style-name="Tabela1.B2" office:value-type="string">
            <text:p text:style-name="P2">JAKO Pacjent<text:line-break/><text:line-break/>CHCĘ móc zarejestrować konto<text:line-break/><text:line-break/>ABY zyskać możliwość rejestracji w serwisie<text:line-break/><text:line-break/><text:line-break/><text:line-break/>Definition of Done:<text:line-break/><text:line-break/> Na stronie głównej istnieje przycisk"Zarejestruj”;<text:line-break/> Po kliknięciu w przycisk"Zarejestruj” wyświetla się formularz rejestracji;<text:line-break/> W formularzu rejestracji istnieją pola i przypisane im etykiety:<text:line-break/> "Imię“ (pole testowe),<text:line-break/>"Nazwisko” (pole tekstowe),<text:line-break/> Data urodzenia (pole date),<text:line-break/> Email (pole testowe),<text:line-break/> Hasło(pole password);<text:line-break/> Na dole formularza istnieje przycisk"Stwórz konto”;<text:line-break/> Po kliknięciu przycisku"Stwórz konto” następuje walidacja pól i zapis do bazy;<text:line-break/> Po przejściu pomyślnie rejestracji wyświetla się komunikat"Pomyślnie zarejestrowano Pacjenta”.</text:p>
          </table:table-cell>
        </table:table-row>
        <table:table-row table:style-name="Tabela1.3">
          <table:table-cell table:style-name="Tabela1.A2" office:value-type="string">
            <text:p text:style-name="P2">1.2 Logowanie </text:p>
          </table:table-cell>
          <table:table-cell table:style-name="Tabela1.B2" office:value-type="string">
            <text:p text:style-name="P2">JAKO Pacjent<text:line-break/><text:line-break/>CHCĘ móc zalogować się na swoje konto<text:line-break/><text:line-break/>ABY móc korzystać z pełni możliwości serwisu<text:line-break/><text:line-break/><text:line-break/><text:line-break/>Definition of Done:<text:line-break/><text:line-break/> Na stronie głównej istnieje przycisk"Zaloguj”;<text:line-break/> Po kliknięciu w przycisk"Zaloguj” wyświetla się formularz logowania;<text:line-break/> W formularzu logowaniaistnieją pola i przypisane im etykiety:<text:line-break/> Email (pole testowe),<text:line-break/> Hasło(pole password);<text:line-break/> Na dole formularza istnieje przycisk"Zaloguj”;<text:line-break/> Po kliknięciu przycisku"Zaloguj” następuje walidacja pól i sprawdzenie danych w bazie;<text:line-break/> Po przejściu pomyślnie logowania wyświetla się strona główna;<text:line-break/> Na stronie głównej w miejscu przycisku"Zaloguj” wyświetla się Imię Pacjenta.</text:p>
          </table:table-cell>
        </table:table-row>
        <text:soft-page-break/>
        <table:table-row table:style-name="Tabela1.4">
          <table:table-cell table:style-name="Tabela1.A2" office:value-type="string">
            <text:p text:style-name="P2">1.3 Reset hasła</text:p>
          </table:table-cell>
          <table:table-cell table:style-name="Tabela1.B2" office:value-type="string">
            <text:p text:style-name="P2"><text:span text:style-name="T1">JAKO Pacjent<text:line-break/><text:line-break/>CHCĘ móc zresetować hasło<text:line-break/><text:line-break/>ABY po zapomnieniu hasła móc zalogować się do istniejącego konta<text:line-break/><text:line-break/><text:line-break/><text:line-break/>Definition of Done:<text:line-break/><text:line-break/> Na stronie głównej istnieje przycisk"Zaloguj”;<text:line-break/> Po kliknięciu w przycisk"Zaloguj” wyświetla się formularz logowania;<text:line-break/> W formularza istnieje link"Zresetuj hasło”;<text:line-break/> Po kliknięciu w link"Zresetuj hasło” wyświetla się formularz resetowania hasła;<text:line-break/> W formularzu resetowania hasła istnieją pola i przypisane im etykiety:<text:line-break/> Email (pole testowe),<text:line-break/> Nowe hasło (min. 8 znaków)<text:line-break/> Na dole formularza istnieje przycisk"Zresetuj hasło”;<text:line-break/> Po kliknięciu przycisku"Zresetuj hasło” następuje walidacja pól i sprawdzenie poprawności w bazie;<text:line-break/> Na dole istnieje przycisk"Zresetuj hasło”;<text:line-break/> Po kliknięciu przycisku"Zresetuj hasło” następuje zmiana hasła w bazie;<text:line-break/> Wyświetla się strona logowania.</text:span></text:p>
          </table:table-cell>
        </table:table-row>
        <table:table-row table:style-name="Tabela1.5">
          <table:table-cell table:style-name="Tabela1.A2" office:value-type="string">
            <text:p text:style-name="P2">2.1 Wyszukiwanie lekarza po specjalizacji</text:p>
          </table:table-cell>
          <table:table-cell table:style-name="Tabela1.B2" office:value-type="string">
            <text:p text:style-name="P2">JAKO Pacjent<text:line-break/><text:line-break/>CHCĘ móc wyszukać lekarza po specjalizacji<text:line-break/><text:line-break/>ABY znaleźć odpowiedniego specjalistę<text:line-break/><text:line-break/><text:line-break/><text:line-break/>Definition of Done:<text:line-break/><text:line-break/> Na stronie głównej istnieje pole wyszukiwania;<text:line-break/> W polu wyszukiwania istnieje możliwość wpisania specjalizacji;<text:line-break/> Na stronie istnieje przycisk"Szukaj”;<text:line-break/> Po kliknięciu przycisku"Szukaj” następuje pobranie danych z bazy;<text:line-break/> Wyświetla się lista lekarzy zgodnych z wpisaną specjalizacją;<text:line-break/> Każdy wynik zawiera imię i nazwisko lekarza oraz specjalizację.</text:p>
          </table:table-cell>
        </table:table-row>
        <table:table-row table:style-name="Tabela1.5">
          <table:table-cell table:style-name="Tabela1.A2" office:value-type="string">
            <text:p text:style-name="P2">2.2 Wyszukiwanie lekarza po lokalizacji</text:p>
          </table:table-cell>
          <table:table-cell table:style-name="Tabela1.B2" office:value-type="string">
            <text:p text:style-name="P2">JAKO Pacjent<text:line-break/><text:line-break/><text:soft-page-break/>CHCĘ móc wyszukać lekarza po lokalizacji<text:line-break/><text:line-break/>ABY znaleźć lekarza w swoim mieście<text:line-break/><text:line-break/><text:line-break/><text:line-break/>Definition of Done:<text:line-break/><text:line-break/> Na stronie głównej istnieje pole wyszukiwania;<text:line-break/> W polu istnieje możliwość wpisania miasta;<text:line-break/> Na stronie istnieje przycisk"Szukaj”;<text:line-break/> Po kliknięciu przycisku"Szukaj” następuje pobranie danych z bazy;<text:line-break/> Wyświetla się lista lekarzy z wybranego miasta;<text:line-break/> Każdy wynik zawiera imię i nazwisko lekarza oraz adres gabinetu.</text:p>
          </table:table-cell>
        </table:table-row>
        <table:table-row table:style-name="Tabela1.5">
          <table:table-cell table:style-name="Tabela1.A2" office:value-type="string">
            <text:p text:style-name="P2">2.3 Wyszukiwanie lekarza po nazwisku</text:p>
          </table:table-cell>
          <table:table-cell table:style-name="Tabela1.B2" office:value-type="string">
            <text:p text:style-name="P2">JAKO Pacjent<text:line-break/><text:line-break/>CHCĘ móc wyszukać lekarza po nazwisku<text:line-break/><text:line-break/>ABY szybko odnaleźć konkretnego lekarza<text:line-break/><text:line-break/><text:line-break/><text:line-break/>Definition of Done:<text:line-break/><text:line-break/> Na stronie głównej istnieje pole wyszukiwania;<text:line-break/> W polu istnieje możliwość wpisania nazwiska lekarza;<text:line-break/> Na stronie istnieje przycisk"Szukaj”;<text:line-break/> Po kliknięciu przycisku"Szukaj” następuje pobranie danych z bazy;<text:line-break/> Wyświetla się lista lekarzy zgodnych z wpisanym nazwiskiem;<text:line-break/> Każdy wynik zawiera imię i nazwisko lekarza oraz specjalizację.</text:p>
          </table:table-cell>
        </table:table-row>
        <table:table-row table:style-name="Tabela1.8">
          <table:table-cell table:style-name="Tabela1.A2" office:value-type="string">
            <text:p text:style-name="P2">2.4 Filtrowanie wyników</text:p>
          </table:table-cell>
          <table:table-cell table:style-name="Tabela1.B2" office:value-type="string">
            <text:p text:style-name="P2"><text:span text:style-name="T1">JAKO Pacjent<text:line-break/><text:line-break/>CHCĘ móc filtrować wyniki wyszukiwania<text:line-break/><text:line-break/>ABY zawęzić listę lekarzy<text:line-break/><text:line-break/><text:line-break/><text:line-break/>Definition of Done:<text:line-break/><text:line-break/> Na stronie wyników istnieją opcje filtrowania;<text:line-break/> Istnieje możliwość filtrowania po specjalizacji;<text:line-break/> Istnieje możliwość filtrowania po lokalizacji;<text:line-break/> Po zastosowaniu filtrów lista wyników zostaje zaktualizowana;<text:line-break/> Wyświetlane są tylko wyniki spełniające wybrane </text:span><text:soft-page-break/><text:span text:style-name="T1">kryteria.</text:span></text:p>
          </table:table-cell>
        </table:table-row>
        <table:table-row table:style-name="Tabela1.8">
          <table:table-cell table:style-name="Tabela1.A2" office:value-type="string">
            <text:p text:style-name="P2">2.5 Sortowanie wyników</text:p>
          </table:table-cell>
          <table:table-cell table:style-name="Tabela1.B2" office:value-type="string">
            <text:p text:style-name="P2">JAKO Pacjent<text:line-break/><text:line-break/>CHCĘ móc sortować wyniki wyszukiwania<text:line-break/><text:line-break/>ABY łatwiej znaleźć najlepszego lekarza<text:line-break/><text:line-break/><text:line-break/><text:line-break/>Definition of Done:<text:line-break/><text:line-break/> Na stronie wyników istnieje opcja sortowania;<text:line-break/> Istnieje możliwość sortowania po ocenie;<text:line-break/> Istnieje możliwość sortowania alfabetycznie;<text:line-break/> Po wybraniu opcji sortowania lista wyników zostaje uporządkowana;<text:line-break/> Zmiana sortowania aktualizuje widok bez przeładowania strony.</text:p>
          </table:table-cell>
        </table:table-row>
        <table:table-row table:style-name="Tabela1.8">
          <table:table-cell table:style-name="Tabela1.A2" office:value-type="string">
            <text:p text:style-name="P2">3.1 Opis lekarza</text:p>
          </table:table-cell>
          <table:table-cell table:style-name="Tabela1.B2" office:value-type="string">
            <text:p text:style-name="P2">JAKO Pacjent<text:line-break/><text:line-break/>CHCĘ móc zobaczyć opis lekarza<text:line-break/><text:line-break/>ABY dowiedzieć się więcej o jego doświadczeniu i kompetencjach<text:line-break/><text:line-break/><text:line-break/><text:line-break/>Definition of Done:<text:line-break/><text:line-break/> Istnieje profil lekarza;<text:line-break/> Na stronie profilu lekarza wyświetla się sekcja"Opis”;<text:line-break/> Sekcja zawiera informacje o lekarzu;<text:line-break/> Dane pobierane są z bazy danych;<text:line-break/> Opis jest widoczny dla każdego użytkownika.</text:p>
          </table:table-cell>
        </table:table-row>
        <table:table-row table:style-name="Tabela1.8">
          <table:table-cell table:style-name="Tabela1.A2" office:value-type="string">
            <text:p text:style-name="P2">3.2 Lista usług</text:p>
          </table:table-cell>
          <table:table-cell table:style-name="Tabela1.B2" office:value-type="string">
            <text:p text:style-name="P2"><text:span text:style-name="T1">JAKO Pacjent<text:line-break/><text:line-break/>CHCĘ móc zobaczyć listę usług lekarza<text:line-break/><text:line-break/>ABY wiedzieć jakie świadczenia oferuje<text:line-break/><text:line-break/><text:line-break/><text:line-break/>Definition of Done:<text:line-break/><text:line-break/> Istnieje profil lekarza;<text:line-break/> Na stronie profilu lekarza wyświetla się sekcja"Usługi”;<text:line-break/> Lista usług jest pobierana z bazy danych;<text:line-break/> Każda usługa jest wyświetlana jako osobna pozycja;<text:line-break/> Lista usług jest widoczna dla użytkownika.</text:span></text:p>
          </table:table-cell>
        </table:table-row>
        <text:soft-page-break/>
        <table:table-row table:style-name="Tabela1.8">
          <table:table-cell table:style-name="Tabela1.A2" office:value-type="string">
            <text:p text:style-name="P2">3.3 Ceny wizyt</text:p>
          </table:table-cell>
          <table:table-cell table:style-name="Tabela1.B2" office:value-type="string">
            <text:p text:style-name="P2">JAKO Pacjent<text:line-break/><text:line-break/>CHCĘ móc zobaczyć ceny wizyt<text:line-break/><text:line-break/>ABY móc podjąć decyzję o wyborze lekarza<text:line-break/><text:line-break/><text:line-break/><text:line-break/>Definition of Done:<text:line-break/><text:line-break/> Istnieje profil lekarza;<text:line-break/> Na stronie profilu lekarza wyświetla się sekcja"Cennik”;<text:line-break/> Każda usługa posiada przypisaną cenę;<text:line-break/> Dane pobierane są z bazy danych;<text:line-break/> Ceny są widoczne dla użytkownika.</text:p>
          </table:table-cell>
        </table:table-row>
        <table:table-row table:style-name="Tabela1.13">
          <table:table-cell table:style-name="Tabela1.A2" office:value-type="string">
            <text:p text:style-name="P2">3.4 Dostępne terminy</text:p>
          </table:table-cell>
          <table:table-cell table:style-name="Tabela1.B2" office:value-type="string">
            <text:p text:style-name="P2">JAKO Pacjent<text:line-break/><text:line-break/>CHCĘ móc zobaczyć dostępne terminy wizyt<text:line-break/><text:line-break/>ABY móc wybrać dogodny termin<text:line-break/><text:line-break/><text:line-break/><text:line-break/>Definition of Done:<text:line-break/><text:line-break/> Istnieje profil lekarza;<text:line-break/> Na stronie profilu lekarza wyświetla się sekcja"Dostępne terminy”;<text:line-break/> W sekcji"Dostępne terminy” można wybrać usługę z listy wybieralnej;<text:line-break/> Terminy są pobierane z bazy danych odpowiednio do wybranej usługi;<text:line-break/> Wyświetlana jest lista dostępnych dni i godzin;<text:line-break/> Terminy zajęte są wyświetlane w kolorze szarym.<text:line-break/> W sekcji"Dostępne terminy” widnieje przycisk"Zapisz się”, który przenosi do strony"Rezerwacja wizyty”.<text:line-break/> Sekcja pełni funkcję informacyjną, aby pacjent mógł szybko sprawdzić, czy w najbliższym czasie lekarz ma wolne terminy;</text:p>
          </table:table-cell>
        </table:table-row>
        <table:table-row table:style-name="Tabela1.8">
          <table:table-cell table:style-name="Tabela1.A2" office:value-type="string">
            <text:p text:style-name="P2">3.5 Oceny pacjentów</text:p>
          </table:table-cell>
          <table:table-cell table:style-name="Tabela1.B2" office:value-type="string">
            <text:p text:style-name="P2"><text:span text:style-name="T1">JAKO Pacjent<text:line-break/><text:line-break/>CHCĘ móc zobaczyć oceny innych pacjentów<text:line-break/><text:line-break/>ABY wybrać najlepszego lekarza<text:line-break/><text:line-break/><text:line-break/><text:line-break/>Definition of Done:<text:line-break/><text:line-break/> Istnieje profil lekarza;<text:line-break/> Na stronie profilu lekarza wyświetla się </text:span><text:soft-page-break/><text:span text:style-name="T1">sekcja"Oceny”;<text:line-break/> Wyświetlana jest średnia ocena lekarza;<text:line-break/> Wyświetlana jest lista opinii pacjentów;<text:line-break/> Dane pobierane są z bazy danych.</text:span></text:p>
          </table:table-cell>
        </table:table-row>
        <table:table-row table:style-name="Tabela1.8">
          <table:table-cell table:style-name="Tabela1.A2" office:value-type="string">
            <text:p text:style-name="P2">4.1 Lista nadchodzących wizyt</text:p>
          </table:table-cell>
          <table:table-cell table:style-name="Tabela1.B2" office:value-type="string">
            <text:p text:style-name="P2">JAKO Pacjent<text:line-break/><text:line-break/>CHCĘ móc zobaczyć listę nadchodzących wizyt<text:line-break/><text:line-break/>ABY kontrolować swoje zaplanowane wizyty<text:line-break/><text:line-break/><text:line-break/><text:line-break/>Definition of Done:<text:line-break/><text:line-break/> Istnieje profil pacjenta;<text:line-break/> Na profilu pacjenta istnieje sekcja"Nadchodzące wizyty”;<text:line-break/> Lista wizyt jest pobierana z bazy danych;<text:line-break/> Wyświetlane są daty, godziny oraz lekarze;<text:line-break/> Widoczne są tylko przyszłe wizyty.</text:p>
          </table:table-cell>
        </table:table-row>
        <table:table-row table:style-name="Tabela1.16">
          <table:table-cell table:style-name="Tabela1.A2" office:value-type="string">
            <text:p text:style-name="P2">4.2 Anulowanie wizyty</text:p>
          </table:table-cell>
          <table:table-cell table:style-name="Tabela1.B2" office:value-type="string">
            <text:p text:style-name="P2">JAKO Pacjent<text:line-break/><text:line-break/>CHCĘ móc anulować wizytę<text:line-break/><text:line-break/>ABY zrezygnować z zaplanowanego terminu<text:line-break/><text:line-break/><text:line-break/><text:line-break/>Definition of Done:<text:line-break/><text:line-break/> Istnieje profil pacjenta;<text:line-break/> Wyświetla się lista nadchodzących wizyt;<text:line-break/> Na liście nadchodzących wizyt istnieje przycisk"Anuluj” przypisany do konkretnej wizyty;<text:line-break/> Po kliknięciu przycisku wyświetla się potwierdzenie anulowania;<text:line-break/> Po potwierdzeniu anulowania, wizyta zostaje usunięta z listy;<text:line-break/> Termin zostaje zwolniony w systemie;<text:line-break/> Dane w bazie zostają zaktualizowane.</text:p>
          </table:table-cell>
        </table:table-row>
        <table:table-row table:style-name="Tabela1.5">
          <table:table-cell table:style-name="Tabela1.A2" office:value-type="string">
            <text:p text:style-name="P2">4.3 Zmiana terminu</text:p>
          </table:table-cell>
          <table:table-cell table:style-name="Tabela1.B2" office:value-type="string">
            <text:p text:style-name="P2"><text:span text:style-name="T1">JAKO Pacjent<text:line-break/><text:line-break/>CHCĘ móc zmienić termin wizyty<text:line-break/><text:line-break/>ABY dopasować wizytę do swojego czasu<text:line-break/><text:line-break/><text:line-break/><text:line-break/>Definition of Done:<text:line-break/><text:line-break/> Istnieje profil pacjenta;<text:line-break/></text:span><text:soft-page-break/><text:span text:style-name="T1"> Na liście wizyt istnieje przycisk"Zmień termin”;<text:line-break/> Po kliknięciu wyświetla się dostępny kalendarz z terminami zaczynającymi się od dzisiejszej daty + 1dn roboczy (da się zapisać co najmniej na następny dzień);<text:line-break/> Użytkownik może wybrać nowy termin, o ile ten jest wolny;<text:line-break/> Po zatwierdzeniu termin wizyty zostaje zaktualizowany;<text:line-break/> Zmiana jest zapisywana w bazie danych.</text:span></text:p>
          </table:table-cell>
        </table:table-row>
        <table:table-row table:style-name="Tabela1.8">
          <table:table-cell table:style-name="Tabela1.A2" office:value-type="string">
            <text:p text:style-name="P2">4.4 Historia wizyt</text:p>
          </table:table-cell>
          <table:table-cell table:style-name="Tabela1.B2" office:value-type="string">
            <text:p text:style-name="P2">JAKO Pacjent<text:line-break/><text:line-break/>CHCĘ móc zobaczyć historię wizyt<text:line-break/><text:line-break/>ABY mieć wgląd w wcześniejsze konsultacje<text:line-break/><text:line-break/><text:line-break/><text:line-break/>Definition of Done:<text:line-break/><text:line-break/> Istnieje profil pacjenta;<text:line-break/> Na profilu pacjenta istnieje sekcja"Historia wizyt”;<text:line-break/> Lista wizyt jest pobierana z bazy danych;<text:line-break/> Wyświetlane są przeszłe wizyty;<text:line-break/> Każda pozycja zawiera datę, lekarza i usługę.</text:p>
          </table:table-cell>
        </table:table-row>
        <table:table-row table:style-name="Tabela1.13">
          <table:table-cell table:style-name="Tabela1.A2" office:value-type="string">
            <text:p text:style-name="P2">4.5 Ocena lekarzy</text:p>
          </table:table-cell>
          <table:table-cell table:style-name="Tabela1.B2" office:value-type="string">
            <text:p text:style-name="P2">JAKO Pacjent<text:line-break/><text:line-break/>CHCĘ móc ocenić lekarza<text:line-break/><text:line-break/>ABY podzielić się swoją opinią<text:line-break/><text:line-break/><text:line-break/><text:line-break/>Definition of Done:<text:line-break/><text:line-break/> Istnieje profil pacjenta;<text:line-break/> Wyświetla się lista odbytych wizyt;<text:line-break/> Na liście odbytych wizyt istnieje przycisk"Wystaw ocenę”, o ile pacjent nie wystawił wcześniej oceny;<text:line-break/> Jeśli pacjent wystawił już ocenę, ta wyświetla się zamiast przycisku"Wystaw ocenę”;<text:line-break/> Po kliknięciu w przycisk"Wystaw ocenę” wyświetla się formularz oceny;<text:line-break/> Użytkownik może dodać ocenę;<text:line-break/> Ocena zostaje zapisana w bazie danych;<text:line-break/> Ocena jest widoczna na profilu lekarza.</text:p>
          </table:table-cell>
        </table:table-row>
        <table:table-row table:style-name="Tabela1.5">
          <table:table-cell table:style-name="Tabela1.A2" office:value-type="string">
            <text:p text:style-name="P2">4.6 Modyfikacja danych osobowych</text:p>
          </table:table-cell>
          <table:table-cell table:style-name="Tabela1.B2" office:value-type="string">
            <text:p text:style-name="P2">JAKO Pacjent<text:line-break/><text:line-break/>CHCĘ móc edytować swoje dane<text:line-break/><text:line-break/>ABY aktualizować informacje o sobie<text:line-break/><text:soft-page-break/><text:line-break/><text:line-break/><text:line-break/>Definition of Done:<text:line-break/><text:line-break/> Istnieje profil pacjenta;<text:line-break/> Na profilu pacjenta istnieje przycisk"Edytuj dane”;<text:line-break/> Wyświetla się formularz z aktualnymi danymi;<text:line-break/> Użytkownik może zmienić dane;<text:line-break/> Po zapisaniu następuje walidacja;<text:line-break/> Dane zostają zaktualizowane w bazie.</text:p>
          </table:table-cell>
        </table:table-row>
        <table:table-row table:style-name="Tabela1.5">
          <table:table-cell table:style-name="Tabela1.A2" office:value-type="string">
            <text:p text:style-name="P2">4.7 Usunięcie konta</text:p>
          </table:table-cell>
          <table:table-cell table:style-name="Tabela1.B2" office:value-type="string">
            <text:p text:style-name="P2">JAKO Pacjent<text:line-break/><text:line-break/>CHCĘ móc usunąć swoje konto<text:line-break/><text:line-break/>ABY zakończyć korzystanie z serwisu<text:line-break/><text:line-break/><text:line-break/><text:line-break/>Definition of Done:<text:line-break/><text:line-break/> Istnieje profil pacjenta;<text:line-break/> Na profilu pacjenta istnieje przycisk"Usuń konto”;<text:line-break/> Po kliknięciu wyświetla się potwierdzenie;<text:line-break/> Po potwierdzeniu konto zostaje usunięte;<text:line-break/> Dane użytkownika zostają usunięte z bazy danych;<text:line-break/> Użytkownik zostaje wylogowany z systemu.</text:p>
          </table:table-cell>
        </table:table-row>
        <table:table-row table:style-name="Tabela1.22">
          <table:table-cell table:style-name="Tabela1.A2" office:value-type="string">
            <text:p text:style-name="P2">5.1 Kalendarz dostępnych wizyt</text:p>
          </table:table-cell>
          <table:table-cell table:style-name="Tabela1.B2" office:value-type="string">
            <text:p text:style-name="P2"><text:span text:style-name="T1">JAKO Pacjent<text:line-break/><text:line-break/>CHCĘ móc przeglądać kalendarz dostępnych wizyt<text:line-break/><text:line-break/>ABY znaleźć dogodny termin wizyty<text:line-break/><text:line-break/><text:line-break/><text:line-break/>Definition of Done:<text:line-break/><text:line-break/> Istnieje profil lekarza;<text:line-break/> Na stronie profilu lekarza istnieje przycisk"Zapisz się”, który przenosi do strony rezerwacji;<text:line-break/> Na stronie rezerwacji wizyty wyświetla się kalendarz dostępnych wizyt;<text:line-break/> Kalendarz prezentuje dostępne terminy lekarzy;<text:line-break/> Kalendarz wyświetla terminy w danym tygodniu podzielonym na dni (kolumny) a te wyświetlają godziny przyjęć (wiersze);<text:line-break/> Dostępne terminy są pobierane z bazy danych;<text:line-break/> Zajęte terminy nie są możliwe do wybrania;<text:line-break/> Po wybraniu terminu zostaje on podświetlony.<text:line-break/> Wyświetla się przycisk"Anuluj” koloru czerwonego, po przyciśnięciu którego następuje przeniesienie na </text:span><text:soft-page-break/><text:span text:style-name="T1">profil lekarza;<text:line-break/> Wyświetla się przycisk"Zapisz się na wizytę” koloru zielonego;</text:span></text:p>
          </table:table-cell>
        </table:table-row>
        <table:table-row table:style-name="Tabela1.16">
          <table:table-cell table:style-name="Tabela1.A2" office:value-type="string">
            <text:p text:style-name="P2">6.1 Rezerwacja wizyty</text:p>
          </table:table-cell>
          <table:table-cell table:style-name="Tabela1.B2" office:value-type="string">
            <text:p text:style-name="P2">JAKO Pacjent<text:line-break/><text:line-break/>CHCĘ móc zarezerwować wizytę<text:line-break/><text:line-break/>ABY inny Pacjent nie mógł wybrać mojej wizyty<text:line-break/><text:line-break/><text:line-break/><text:line-break/>Definition of Done:<text:line-break/><text:line-break/> Istnieje profil lekarza;<text:line-break/> Istnieje przycisk"Zapisz się”, który przenosi do strony"Rezerwacja wizyty”;<text:line-break/> Wyświetla się lista wybieralna z usługami danego lekarza;<text:line-break/> Wyświetla się kalendarz dostępnych godzin;<text:line-break/> Można wybrać wolny termin;<text:line-break/> W formularzu"Rezerwacji wizyt” istnieje przycisk"Zapisz się na wizytę”;<text:line-break/> Po kliknięciu przycisku"Zapisz się na wizytę” wyświetla się formularz potwierdzenia wizyty.</text:p>
          </table:table-cell>
        </table:table-row>
        <table:table-row table:style-name="Tabela1.13">
          <table:table-cell table:style-name="Tabela1.A2" office:value-type="string">
            <text:p text:style-name="P2">6.2 Potwierdzenie wizyty</text:p>
          </table:table-cell>
          <table:table-cell table:style-name="Tabela1.B2" office:value-type="string">
            <text:p text:style-name="P2"><text:span text:style-name="T1">JAKO Pacjent<text:line-break/><text:line-break/>CHCĘ móc potwierdzić wizytę kodem otrzymanym mailowo<text:line-break/><text:line-break/>ABY zakończyć proces rezerwacji wizyty<text:line-break/><text:line-break/><text:line-break/><text:line-break/>Definition of Done:<text:line-break/><text:line-break/> Po wybraniu usługi i terminu wyświetla się formularz potwierdzenia wizyty;<text:line-break/> Na formularzu istnieje przycisk"Anuluj”, który przenosi do profilu lekarza;<text:line-break/> Na formularzu istnieje przycisk"Potwierdzam”, który po kliknięciu się wyszarza;<text:line-break/> Po kliknięciu przycisku"Potwierdzam” system wysyła kod potwierdzający na adres e-mail Pacjenta;<text:line-break/> Na formularzu istnieje pole"Kod potwierdzający” (pole tekstowe);<text:line-break/> Po wpisaniu kodu przycisk"Potwierdzam” staje się zielony i możliwy do kliknięcia;<text:line-break/> Po kliknięciu przycisku"Potwierdzam” (po raz drugi) następuje walidacja kodu;<text:line-break/> Po poprawnym potwierdzeniu wizyty wyświetla się </text:span><text:soft-page-break/><text:span text:style-name="T1">komunikat"Wizyta została zarezerwowana”.</text:span></text:p>
          </table:table-cell>
        </table:table-row>
        <table:table-row table:style-name="Tabela1.16">
          <table:table-cell table:style-name="Tabela1.A2" office:value-type="string">
            <text:p text:style-name="P2">7.1 Zarządzanie użytkownikami</text:p>
          </table:table-cell>
          <table:table-cell table:style-name="Tabela1.B2" office:value-type="string">
            <text:p text:style-name="P2">JAKO Administrator<text:line-break/><text:line-break/>CHCĘ móc zarządzać użytkownikami<text:line-break/><text:line-break/>ABY kontrolować dostęp do systemu<text:line-break/><text:line-break/><text:line-break/><text:line-break/>Definition of Done:<text:line-break/><text:line-break/> Istnieje panel administratora dostępny jedynie dla użytkownika typu"Admin”<text:line-break/> Na stronie panelu administratora istnieje sekcja"Użytkownicy”;<text:line-break/> Wyświetla się lista użytkowników pobrana z bazy danych;<text:line-break/> Każdy użytkownik posiada podstawowe informacje: imię, nazwisko oraz email;<text:line-break/> Na liście istnieje możliwość edycji użytkownika;<text:line-break/> Na liście istnieje możliwość usunięcia użytkownika;<text:line-break/> Po wykonaniu operacji dane zostają zaktualizowane w bazie.</text:p>
          </table:table-cell>
        </table:table-row>
        <table:table-row table:style-name="Tabela1.3">
          <table:table-cell table:style-name="Tabela1.A2" office:value-type="string">
            <text:p text:style-name="P2">7.2 Zarządzanie lekarzami</text:p>
          </table:table-cell>
          <table:table-cell table:style-name="Tabela1.B2" office:value-type="string">
            <text:p text:style-name="P2">JAKO Administrator<text:line-break/><text:line-break/>CHCĘ móc zarządzać lekarzami<text:line-break/><text:line-break/>ABY dodawać i edytować ich dane<text:line-break/><text:line-break/><text:line-break/><text:line-break/>Definition of Done:<text:line-break/><text:line-break/> Istnieje panel administratora;<text:line-break/> Na stronie panelu administratora istnieje sekcja"Lekarze”;<text:line-break/> Wyświetla się lista lekarzy pobrana z bazy danych;<text:line-break/> Na stronie istnieje przycisk"Dodaj lekarza”;<text:line-break/> Po kliknięciu przycisku"Dodaj lekarza” wyświetla się formularz dodawania lekarza;<text:line-break/> Formularz zawiera pola: imię, nazwisko, specjalizacja, adres gabinetu;<text:line-break/> Na liście istnieje możliwość edycji lekarza;<text:line-break/> Na liście istnieje możliwość usunięcia lekarza;<text:line-break/> Po wykonaniu operacji dane zostają zapisane w bazie.</text:p>
          </table:table-cell>
        </table:table-row>
        <table:table-row table:style-name="Tabela1.5">
          <table:table-cell table:style-name="Tabela1.A2" office:value-type="string">
            <text:p text:style-name="P2">7.3 Przegląd wizyt w bazie</text:p>
          </table:table-cell>
          <table:table-cell table:style-name="Tabela1.B2" office:value-type="string">
            <text:p text:style-name="P2">JAKO Administrator<text:line-break/><text:line-break/>CHCĘ móc przeglądać wizyty<text:line-break/><text:line-break/>ABY mieć kontrolę nad rezerwacjami<text:line-break/><text:line-break/><text:soft-page-break/><text:line-break/><text:line-break/>Definition of Done:<text:line-break/><text:line-break/> Istnieje panel administratora;<text:line-break/> Na stronie panelu administratora istnieje sekcja"Wizyty”;<text:line-break/> Wyświetla się lista wizyt pobrana z bazy danych;<text:line-break/> Każda wizyta zawiera informacje o pacjencie, lekarzu, dacie i godzinie;<text:line-break/> Na liście istnieje możliwość filtrowania wizyt;<text:line-break/> Na liście istnieje możliwość sortowania wizyt.</text:p>
          </table:table-cell>
        </table:table-row>
        <table:table-row table:style-name="Tabela1.28">
          <table:table-cell table:style-name="Tabela1.A2" office:value-type="string">
            <text:p text:style-name="P2">8.1 Email potwierdzający wizytę</text:p>
          </table:table-cell>
          <table:table-cell table:style-name="Tabela1.B2" office:value-type="string">
            <text:p text:style-name="P2">JAKO Pacjent<text:line-break/><text:line-break/>CHCĘ otrzymać email potwierdzający wizytę<text:line-break/><text:line-break/>ABY mieć potwierdzenie rezerwacji<text:line-break/><text:line-break/><text:line-break/><text:line-break/>Definition of Done:<text:line-break/><text:line-break/> Po poprawnym zarezerwowaniu wizyty system wysyła email na adres Pacjenta;<text:line-break/> Email zawiera informacje o lekarzu, dacie i godzinie wizyty;</text:p>
          </table:table-cell>
        </table:table-row>
        <table:table-row table:style-name="Tabela1.8">
          <table:table-cell table:style-name="Tabela1.A2" office:value-type="string">
            <text:p text:style-name="P2">8.2 Przypomnienie o wizycie</text:p>
          </table:table-cell>
          <table:table-cell table:style-name="Tabela1.B2" office:value-type="string">
            <text:p text:style-name="P2"><text:span text:style-name="T1">JAKO Pacjent<text:line-break/><text:line-break/>CHCĘ otrzymać przypomnienie o wizycie<text:line-break/><text:line-break/>ABY nie zapomnieć o terminie<text:line-break/><text:line-break/><text:line-break/><text:line-break/>Definition of Done:<text:line-break/><text:line-break/> System wysyła przypomnienie o wizycie na 24h przed terminem wizyty;<text:line-break/> Jeśli pacjent zapisze się na wizytę, która odbędzie się mniej niż za 24h powiadomienie przychodzi od razu lub po 5 minutach od potwierdzenia wizyty;<text:line-break/> Email przypominający zawiera informacje o dacie, godzinie i lekarzu;<text:line-break/> Przypomnienie jest wysyłane automatycznie (CRON?);<text:line-break/> Pacjent otrzymuje wiadomość na adres email zapisany w systemie.</text:span></text:p>
          </table:table-cell>
        </table:table-row>
        <table:table-row table:style-name="Tabela1.30">
          <table:table-cell table:style-name="Tabela1.A2" office:value-type="string">
            <text:p text:style-name="P2">8.3 Powiadomienie o anulowaniu</text:p>
          </table:table-cell>
          <table:table-cell table:style-name="Tabela1.B2" office:value-type="string">
            <text:p text:style-name="P2">JAKO Pacjent<text:line-break/><text:line-break/>CHCĘ otrzymać powiadomienie o anulowaniu wizyty<text:line-break/><text:line-break/><text:soft-page-break/>ABY wiedzieć, że wizyta została odwołana<text:line-break/><text:line-break/><text:line-break/><text:line-break/>Definition of Done:<text:line-break/><text:line-break/> Po anulowaniu wizyty system wysyła email do Pacjenta;<text:line-break/> Email zawiera informację o anulowanej wizycie;<text:line-break/> Email zawiera dane lekarza oraz termin wizyty;</text:p>
          </table:table-cell>
        </table:table-row>
        <table:table-row table:style-name="Tabela1.31">
          <table:table-cell table:style-name="Tabela1.A2" office:value-type="string">
            <text:p text:style-name="P2">8.4 Email z kodem potwierdzenia wizyty</text:p>
          </table:table-cell>
          <table:table-cell table:style-name="Tabela1.B2" office:value-type="string">
            <text:p text:style-name="P2">JAKO Pacjent<text:line-break/><text:line-break/>CHCĘ otrzymać kod potwierdzający wizytę<text:line-break/><text:line-break/>ABY pomyślnie przejść proces zapisu na wizytę<text:line-break/><text:line-break/><text:line-break/><text:line-break/>Definition of Done:<text:line-break/><text:line-break/> Istnieje przycisk"Potwierdzam” w formularzu potwierdzenia zapisu na wizytę;<text:line-break/> Po kliknięciu system niezwłocznie wysyła mail z kodem potwierdzającym;<text:line-break/> Email zawiera informację o wizycie;<text:line-break/> Email zawiera kod do potwierdzenia wizyty składający się z 6 cyft;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4T12:52:15.226732500</meta:creation-date>
    <dc:date>2026-06-04T12:57:37.676752400</dc:date>
    <meta:editing-duration>PT4M33S</meta:editing-duration>
    <meta:editing-cycles>2</meta:editing-cycles>
    <meta:generator>LibreOffice/25.2.7.2$Windows_X86_64 LibreOffice_project/5cbfd1ab6520636bb5f7b99185aa69bd7456825d</meta:generator>
    <meta:document-statistic meta:table-count="1" meta:image-count="0" meta:object-count="0" meta:page-count="12" meta:paragraph-count="62" meta:word-count="1914" meta:character-count="14791" meta:non-whitespace-character-count="12567"/>
  </office:meta>
</office:document-meta>
</file>